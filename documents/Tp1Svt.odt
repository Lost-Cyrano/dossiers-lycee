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D000001EE6A81062E7848669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17.009cm"/>
    </style:style>
    <style:style style:name="Tableau1.A1" style:family="table-cell">
      <style:table-cell-properties fo:padding="0.097cm" fo:border="1.5pt solid #000000"/>
    </style:style>
    <style:style style:name="P1" style:family="paragraph" style:parent-style-name="Standard">
      <style:text-properties fo:color="#ff4000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2" style:family="paragraph" style:parent-style-name="Standard">
      <style:text-properties fo:color="#ff4000" loext:opacity="100%" fo:font-size="13pt" fo:font-style="italic" fo:font-weight="bold" officeooo:paragraph-rsid="00126f67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text-properties fo:color="#77bc65" loext:opacity="100%" fo:font-size="15pt" style:text-underline-style="solid" style:text-underline-width="auto" style:text-underline-color="font-color" fo:font-weight="bold" officeooo:paragraph-rsid="00104fc1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color="#77bc65" loext:opacity="100%" fo:font-size="15pt" style:text-underline-style="none" fo:font-weight="normal" officeooo:paragraph-rsid="00104fc1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color="#77bc65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>
      <style:text-properties fo:font-size="13pt" fo:font-style="italic" style:font-size-asian="13pt" style:font-style-asian="italic" style:font-size-complex="13pt" style:font-style-complex="italic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ext_20_body">
      <style:paragraph-properties fo:text-align="center" style:justify-single-word="false" style:writing-mode="lr-tb"/>
      <style:text-properties fo:font-size="17pt" style:text-underline-style="solid" style:text-underline-width="auto" style:text-underline-color="font-color" fo:font-weight="bold" officeooo:rsid="000fe53f" officeooo:paragraph-rsid="000ff659" style:font-size-asian="17pt" style:font-weight-asian="bold" style:font-size-complex="17pt" style:font-weight-complex="bold"/>
    </style:style>
    <style:style style:name="P10" style:family="paragraph">
      <loext:graphic-properties draw:fill-color="#77bc65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officeooo:rsid="000ff659"/>
    </style:style>
    <style:style style:name="T2" style:family="text">
      <style:text-properties officeooo:rsid="000ffa93"/>
    </style:style>
    <style:style style:name="T3" style:family="text">
      <style:text-properties officeooo:rsid="00104fc1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13pt" officeooo:rsid="00126455" style:font-size-asian="13pt" style:font-size-complex="13pt"/>
    </style:style>
    <style:style style:name="T6" style:family="text">
      <style:text-properties fo:color="#000000" loext:opacity="100%" fo:font-size="13pt" officeooo:rsid="00126f67" style:font-size-asian="13pt" style:font-size-complex="13pt"/>
    </style:style>
    <style:style style:name="T7" style:family="text">
      <style:text-properties fo:color="#000000" loext:opacity="100%" fo:font-size="13pt" officeooo:rsid="0013322a" style:font-size-asian="13pt" style:font-size-complex="13pt"/>
    </style:style>
    <style:style style:name="T8" style:family="text">
      <style:text-properties officeooo:rsid="00126f67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77bc65" draw:fill-color="#77bc65" draw:textarea-horizontal-align="justify" draw:textarea-vertical-align="middle" draw:auto-grow-height="false" fo:min-height="0.15cm" fo:min-width="0.159cm"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svg:stroke-color="#77bc65" draw:fill-color="#77bc65" draw:textarea-horizontal-align="justify" draw:textarea-vertical-align="middle" draw:auto-grow-height="false" fo:min-height="0.182cm" fo:min-width="0.155cm" style:run-through="foreground" style:wrap="run-through" style:number-wrapped-paragraphs="no-limit" style:vertical-pos="from-top" style:vertical-rel="page" style:horizontal-pos="from-left" style:horizontal-rel="paragraph"/>
    </style:style>
    <style:style style:name="gr3" style:family="graphic">
      <style:graphic-properties svg:stroke-width="0.199cm" svg:stroke-color="#ff0000" draw:marker-start-width="0.651cm" draw:marker-end-width="0.651cm" draw:fill="none" draw:textarea-horizontal-align="justify" draw:textarea-vertical-align="middle" draw:auto-grow-height="false" fo:min-height="0.266cm" fo:min-width="0.256cm" fo:padding-top="0.099cm" fo:padding-bottom="0.099cm" fo:padding-left="0.099cm" fo:padding-right="0.099cm" style:run-through="foreground" style:wrap="run-through" style:number-wrapped-paragraphs="no-limit" style:vertical-pos="from-top" style:vertical-rel="page" style:horizontal-pos="from-left" style:horizontal-rel="paragraph"/>
    </style:style>
    <style:style style:name="gr4" style:family="graphic">
      <style:graphic-properties svg:stroke-width="0.199cm" svg:stroke-color="#ff0000" draw:marker-start-width="0.651cm" draw:marker-end-width="0.651cm" draw:fill="none" draw:textarea-horizontal-align="justify" draw:textarea-vertical-align="middle" draw:auto-grow-height="false" fo:min-height="2.685cm" fo:min-width="2.404cm" fo:padding-top="0.099cm" fo:padding-bottom="0.099cm" fo:padding-left="0.099cm" fo:padding-right="0.099cm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4" draw:name="Forme 4" draw:style-name="gr1" draw:text-style-name="P10" svg:width="0.78cm" svg:height="0.772cm" svg:x="2.506cm" svg:y="21.565cm">
        <text:p/>
        <draw:enhanced-geometry svg:viewBox="0 0 21600 21600" draw:glue-points="10800 0 0 10800 10800 21600 21600 10800" draw:path-stretchpoint-x="10800" draw:path-stretchpoint-y="10800" draw:text-areas="?f1 ?f1 ?f2 ?f3" draw:type="cross" draw:modifiers="8711.90781049936" draw:enhanced-path="M ?f1 0 L ?f2 0 ?f2 ?f1 21600 ?f1 21600 ?f3 ?f2 ?f3 ?f2 21600 ?f1 21600 ?f1 ?f3 0 ?f3 0 ?f1 ?f1 ?f1 ?f1 0 Z N">
          <draw:equation draw:name="f0" draw:formula="$0 *10799/10800"/>
          <draw:equation draw:name="f1" draw:formula="?f0 "/>
          <draw:equation draw:name="f2" draw:formula="right-?f0 "/>
          <draw:equation draw:name="f3" draw:formula="bottom-?f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" draw:name="Forme 3" draw:style-name="gr2" draw:text-style-name="P10" svg:width="0.795cm" svg:height="0.821cm" svg:x="12.088cm" svg:y="9.617cm">
        <text:p/>
        <draw:enhanced-geometry svg:viewBox="0 0 21600 21600" draw:glue-points="10800 0 0 10800 10800 21600 21600 10800" draw:path-stretchpoint-x="10800" draw:path-stretchpoint-y="10800" draw:text-areas="?f1 ?f1 ?f2 ?f3" draw:type="cross" draw:modifiers="8711.90781049936" draw:enhanced-path="M ?f1 0 L ?f2 0 ?f2 ?f1 21600 ?f1 21600 ?f3 ?f2 ?f3 ?f2 21600 ?f1 21600 ?f1 ?f3 0 ?f3 0 ?f1 ?f1 ?f1 ?f1 0 Z N">
          <draw:equation draw:name="f0" draw:formula="$0 *10799/10800"/>
          <draw:equation draw:name="f1" draw:formula="?f0 "/>
          <draw:equation draw:name="f2" draw:formula="right-?f0 "/>
          <draw:equation draw:name="f3" draw:formula="bottom-?f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" draw:name="Forme 2" draw:style-name="gr3" draw:text-style-name="P11" svg:width="0.641cm" svg:height="0.655cm" svg:x="2.468cm" svg:y="19.7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1" draw:z-index="1" draw:name="Forme 1" draw:style-name="gr4" draw:text-style-name="P11" svg:width="3.678cm" svg:height="4.075cm" svg:x="3.939cm" svg:y="9.45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P9">Observation <text:span text:style-name="T1">de cellule d’ail en mitose </text:span>au microscope optique x<text:span text:style-name="T2">18</text:span><text:span text:style-name="T1">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<draw:frame draw:style-name="fr1" draw:name="Image1" text:anchor-type="as-char" svg:y="-10.098cm" svg:width="16.709cm" svg:height="15.259cm" draw:z-index="0"><draw:image xlink:href="Pictures/100000010000021D000001EE6A81062E7848669B.png" xlink:type="simple" xlink:show="embed" xlink:actuate="onLoad" draw:mime-type="image/png"/></draw:frame></text:p>
          </table:table-cell>
        </table:table-row>
      </table:table>
      <text:p text:style-name="P6"/>
      <text:p text:style-name="P7"/>
      <text:p text:style-name="P2"><text:tab/>: <text:span text:style-name="T3">cellule en début de division </text:span><text:span text:style-name="T8">où l’ADN est condenser en </text:span><text:span text:style-name="T3">chromosome </text:span><text:span text:style-name="T8">pendant <text:tab/></text:span><text:span text:style-name="T3">la métaphase : du fuseau se fixent sur un chromosome de chaque paire et où ils s’aligne au niveau de la pâque équatorial, à mis chemin entre les pôles.</text:span></text:p>
      <text:p text:style-name="P1"/>
      <text:p text:style-name="P5"><text:tab/>: <text:span text:style-name="T3">cellule entre deux division en phase de Growth où les molécules d’ADN sont dérouler en chromatine <text:s/>avec une enveloppe nucléaire reconstitué</text:span></text:p>
      <text:p text:style-name="P3"><text:span text:style-name="T4">________________________________________________________________</text:span></text:p>
      <text:p text:style-name="P3"/>
      <text:p text:style-name="P4"><text:tab/><text:span text:style-name="T5">Pour se multiplier tout en conservant leurs </text:span><text:span text:style-name="T6">46 chromosomes, les cellules utilises un mécanisme en plusieurs phases : elle commence par reformez et regrouper ses chromosomes, elle vas ensuite les </text:span><text:span text:style-name="T7">dupliquer en leurs rajoutant une chromatides identiques à elles même avant de se séparer en 2 cellule distincte où chaqu’une garde une chromatide en guise de nouveau chromosom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09T11:59:55.330000000</dc:date>
    <meta:editing-duration>PT16M27S</meta:editing-duration>
    <meta:editing-cycles>6</meta:editing-cycles>
    <meta:generator>LibreOffice/7.3.7.2$Windows_X86_64 LibreOffice_project/e114eadc50a9ff8d8c8a0567d6da8f454beeb84f</meta:generator>
    <meta:document-statistic meta:table-count="1" meta:image-count="1" meta:object-count="0" meta:page-count="1" meta:paragraph-count="6" meta:word-count="133" meta:character-count="873" meta:non-whitespace-character-count="739"/>
  </office:meta>
</office:document-meta>
</file>