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François-Marie Arouet</text:span>, connu sous le nom de <text:span text:style-name="Strong_20_Emphasis">Voltaire</text:span>, est né le 21 novembre 1694 à Paris. Issu d'une famille bourgeoise, il est rapidement exposé à la culture et à l'éducation, notamment grâce à son père, un notaire, et à sa mère, une femme lettrée. Dès son jeune âge, Voltaire se passionne pour la littérature, la poésie et la philosophie.</text:p>
      <text:p text:style-name="Text_20_body">Dans les années 1710, Voltaire commence à se faire connaître comme écrivain et poète, mais il se heurte à la censure. Ses critiques de la société et de l'Église, ainsi que son esprit satirique, le conduisent à plusieurs emprisonnements, dont le célèbre incident de la Bastille en 1717, où il passe presque un an.</text:p>
      <text:p text:style-name="Text_20_body">Après sa libération, Voltaire s'exile à Cirey, chez Émilie du Châtelet, une mathématicienne et philosophe avec qui il entretient une relation intellectuelle et amoureuse. Cette période est marquée par des travaux majeurs, dont le "Dictionnaire philosophique" et ses pièces de théâtre.</text:p>
      <text:p text:style-name="Text_20_body">Au fil des ans, Voltaire voyage à travers l'Europe, notamment en Angleterre, où il découvre les idées de la liberté d'expression et des droits individuels, influençant ainsi sa pensée. Son engagement en faveur de la tolérance, de la raison et de la justice est particulièrement visible dans ses œuvres, telles que "Candide", qui critique l'optimisme naïf et l'injustice.</text:p>
      <text:p text:style-name="Text_20_body">Voltaire s'illustre également dans ses critiques de la religion et de la superstition. Ses correspondances avec des penseurs comme Rousseau et Diderot, ainsi que ses prises de position sur des événements contemporains, témoignent de son rôle central dans le mouvement des Lumières.</text:p>
      <text:p text:style-name="Text_20_body">Il finit sa vie à Ferney, près de Genève, où il continue à écrire et à défendre ses idées. Voltaire meurt le 30 mai 1778. Son héritage demeure puissant, incarnant la lutte pour la liberté de pensée et les droits de l'homme. Ses œuvres continuent d’inspirer des générations et de susciter la réflexion critique sur la société et la moralité.</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10-11T15:44:30.335000000</dc:date>
    <meta:editing-duration>PT35M22S</meta:editing-duration>
    <meta:editing-cycles>1</meta:editing-cycles>
    <meta:document-statistic meta:table-count="0" meta:image-count="0" meta:object-count="0" meta:page-count="1" meta:paragraph-count="6" meta:word-count="314" meta:character-count="1927" meta:non-whitespace-character-count="1619"/>
    <meta:generator>LibreOffice/7.4.3.2$Windows_X86_64 LibreOffice_project/1048a8393ae2eeec98dff31b5c133c5f1d08b890</meta:generator>
  </office:meta>
</office:document-meta>
</file>