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E000004009DDFA8E8D5DEA93E.png" manifest:media-type="image/png"/>
  <manifest:file-entry manifest:full-path="Pictures/1000000000000090000000C8B47167666E9DFD52.png" manifest:media-type="image/png"/>
  <manifest:file-entry manifest:full-path="Pictures/1000000000000400000002402CFF9735042523B3.png" manifest:media-type="image/png"/>
  <manifest:file-entry manifest:full-path="Pictures/10000000000001C2000001C22A7A2C1924E7E7C6.png" manifest:media-type="image/png"/>
  <manifest:file-entry manifest:full-path="Pictures/1000000000000298000001BBA6AB296341A4629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Bernard MT Condensed" svg:font-family="'Bernard MT Condensed'" style:font-family-generic="roman" style:font-pitch="variable"/>
    <style:font-face style:name="Blackadder ITC" svg:font-family="'Blackadder ITC'" style:font-family-generic="decorative"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rebuchet MS" svg:font-family="'Trebuchet MS'" style:font-family-generic="swiss" style:font-pitch="variable"/>
  </office:font-face-decls>
  <office:automatic-styles>
    <style:style style:name="P1" style:family="paragraph" style:parent-style-name="Standard">
      <style:text-properties fo:font-size="24pt" officeooo:rsid="0017bb51" officeooo:paragraph-rsid="0017bb51" style:font-size-asian="24pt" style:font-size-complex="24pt"/>
    </style:style>
    <style:style style:name="P2" style:family="paragraph" style:parent-style-name="Standard">
      <style:text-properties officeooo:rsid="001a173d" officeooo:paragraph-rsid="001a173d"/>
    </style:style>
    <style:style style:name="P3" style:family="paragraph" style:parent-style-name="Standard">
      <style:text-properties officeooo:rsid="001a173d" officeooo:paragraph-rsid="001c1b13"/>
    </style:style>
    <style:style style:name="P4" style:family="paragraph" style:parent-style-name="Standard">
      <style:text-properties officeooo:paragraph-rsid="001c1b13"/>
    </style:style>
    <style:style style:name="P5" style:family="paragraph" style:parent-style-name="Standard">
      <style:text-properties officeooo:rsid="001c1b13" officeooo:paragraph-rsid="001c1b13"/>
    </style:style>
    <style:style style:name="P6" style:family="paragraph" style:parent-style-name="Standard">
      <style:text-properties officeooo:rsid="001c1b13" officeooo:paragraph-rsid="001d08dc"/>
    </style:style>
    <style:style style:name="P7" style:family="paragraph" style:parent-style-name="Standard">
      <style:text-properties fo:font-variant="normal" fo:text-transform="none" fo:color="#474747" loext:opacity="100%" style:font-name="Google Sans" fo:font-size="12pt" fo:letter-spacing="normal" fo:font-style="normal" fo:font-weight="normal" officeooo:rsid="001c1b13" officeooo:paragraph-rsid="001c1b13"/>
    </style:style>
    <style:style style:name="P8" style:family="paragraph" style:parent-style-name="Standard">
      <style:text-properties fo:font-variant="normal" fo:text-transform="none" fo:color="#474747" loext:opacity="100%" style:font-name="Google Sans" fo:font-size="12pt" fo:letter-spacing="normal" fo:font-style="normal" fo:font-weight="normal" officeooo:rsid="001a173d" officeooo:paragraph-rsid="001a173d"/>
    </style:style>
    <style:style style:name="P9" style:family="paragraph" style:parent-style-name="Standard">
      <style:text-properties fo:font-variant="normal" fo:text-transform="none" fo:color="#474747" loext:opacity="100%" style:font-name="Google Sans" fo:font-size="12pt" fo:letter-spacing="normal" fo:font-style="normal" fo:font-weight="normal" officeooo:rsid="001a173d" officeooo:paragraph-rsid="001c1b13"/>
    </style:style>
    <style:style style:name="P10" style:family="paragraph" style:parent-style-name="Standard">
      <style:text-properties fo:font-variant="normal" fo:text-transform="none" fo:color="#000000" loext:opacity="100%" style:font-name="Times New Roman" fo:font-size="14pt" fo:letter-spacing="normal" fo:font-style="normal" fo:font-weight="normal" officeooo:rsid="001a173d" officeooo:paragraph-rsid="001c1b13"/>
    </style:style>
    <style:style style:name="P11" style:family="paragraph" style:parent-style-name="Standard">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officeooo:rsid="001d08dc" officeooo:paragraph-rsid="001d08dc"/>
    </style:style>
    <style:style style:name="P12" style:family="paragraph" style:parent-style-name="Standard">
      <style:text-properties officeooo:rsid="001d08dc" officeooo:paragraph-rsid="001d08dc"/>
    </style:style>
    <style:style style:name="P13" style:family="paragraph" style:parent-style-name="Standard">
      <style:paragraph-properties fo:text-align="center" style:justify-single-word="false" fo:break-before="page"/>
      <style:text-properties fo:color="#000000" loext:opacity="100%" style:font-name="Bernard MT Condensed" officeooo:rsid="002027d4" officeooo:paragraph-rsid="0021251c"/>
    </style:style>
    <style:style style:name="P14" style:family="paragraph" style:parent-style-name="Standard">
      <style:paragraph-properties fo:text-align="center" style:justify-single-word="false"/>
      <style:text-properties fo:color="#000000" loext:opacity="100%" style:font-name="Bernard MT Condensed" officeooo:rsid="002027d4" officeooo:paragraph-rsid="0021251c"/>
    </style:style>
    <style:style style:name="P15" style:family="paragraph">
      <loext:graphic-properties draw:fill="none" draw:fill-color="#ffffff"/>
    </style:style>
    <style:style style:name="T1" style:family="text">
      <style:text-properties fo:font-variant="normal" fo:text-transform="none" fo:color="#474747" loext:opacity="100%" style:font-name="Google Sans" fo:font-size="12pt" fo:letter-spacing="normal" fo:font-style="normal" fo:font-weight="normal"/>
    </style:style>
    <style:style style:name="T2" style:family="text">
      <style:text-properties fo:font-variant="normal" fo:text-transform="none" fo:color="#474747" loext:opacity="100%" style:font-name="Google Sans" fo:font-size="12pt" fo:letter-spacing="normal" fo:font-style="normal" fo:font-weight="normal" officeooo:rsid="001a173d"/>
    </style:style>
    <style:style style:name="T3" style:family="text">
      <style:text-properties fo:font-variant="normal" fo:text-transform="none" fo:color="#474747" loext:opacity="100%" style:font-name="Google Sans" fo:font-size="12pt" fo:letter-spacing="normal" fo:font-style="normal" fo:font-weight="normal" officeooo:rsid="001c1b13"/>
    </style:style>
    <style:style style:name="T4" style:family="text">
      <style:text-properties fo:font-variant="normal" fo:text-transform="none" fo:color="#000000" loext:opacity="100%" style:font-name="Times New Roman" fo:font-size="14pt" fo:letter-spacing="normal" fo:font-style="normal" fo:font-weight="normal"/>
    </style:style>
    <style:style style:name="T5" style:family="text">
      <style:text-properties fo:font-variant="normal" fo:text-transform="none" fo:color="#000000" loext:opacity="100%" style:font-name="Times New Roman" fo:font-size="14pt" fo:letter-spacing="normal" fo:font-style="normal" fo:font-weight="normal" officeooo:rsid="001c1b13"/>
    </style:style>
    <style:style style:name="T6" style:family="text">
      <style:text-properties fo:font-variant="normal" fo:text-transform="none" fo:color="#000000" loext:opacity="100%" style:font-name="Times New Roman" fo:font-size="14pt" fo:letter-spacing="normal" fo:font-style="normal" fo:font-weight="normal" officeooo:rsid="001d08dc"/>
    </style:style>
    <style:style style:name="T7" style:family="text">
      <style:text-properties fo:font-variant="normal" fo:text-transform="none" fo:color="#000000" loext:opacity="100%" style:font-name="Times New Roman" fo:font-size="14pt" fo:letter-spacing="normal" fo:font-style="normal" fo:font-weight="normal" officeooo:rsid="001fbbe2"/>
    </style:style>
    <style:style style:name="T8"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style:style>
    <style:style style:name="T9"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officeooo:rsid="001d08dc"/>
    </style:style>
    <style:style style:name="T10" style:family="text">
      <style:text-properties fo:font-variant="normal" fo:text-transform="none" fo:color="#000000" loext:opacity="100%" fo:font-size="14pt" fo:letter-spacing="normal" fo:font-style="normal" fo:font-weight="normal"/>
    </style:style>
    <style:style style:name="T11" style:family="text">
      <style:text-properties fo:font-variant="normal" fo:text-transform="none" fo:color="#000000" loext:opacity="100%" fo:font-size="28pt" fo:letter-spacing="normal" fo:font-style="normal" fo:font-weight="normal" style:font-size-asian="28pt" style:font-size-complex="28pt"/>
    </style:style>
    <style:style style:name="T12" style:family="text">
      <style:text-properties fo:font-variant="normal" fo:text-transform="none" fo:color="#000000" loext:opacity="100%" fo:font-size="44pt" fo:letter-spacing="normal" fo:font-style="normal" fo:font-weight="normal" style:font-size-asian="44pt" style:font-size-complex="44pt"/>
    </style:style>
    <style:style style:name="T13" style:family="text">
      <style:text-properties fo:font-variant="normal" fo:text-transform="none" fo:color="#000000" loext:opacity="100%" fo:font-size="72pt" fo:letter-spacing="normal" fo:font-style="normal" fo:font-weight="normal" style:font-size-asian="72pt" style:font-size-complex="72pt"/>
    </style:style>
    <style:style style:name="T14" style:family="text">
      <style:text-properties fo:font-variant="normal" fo:text-transform="none" fo:color="#000000" loext:opacity="100%" fo:font-size="96pt" fo:letter-spacing="normal" fo:font-style="normal" fo:font-weight="normal" style:font-size-asian="96pt" style:font-size-complex="96pt"/>
    </style:style>
    <style:style style:name="T15" style:family="text">
      <style:text-properties fo:font-variant="normal" fo:text-transform="none" fo:font-size="14pt" fo:letter-spacing="normal" fo:font-style="normal" fo:font-weight="normal"/>
    </style:style>
    <style:style style:name="T16" style:family="text">
      <style:text-properties fo:font-variant="normal" fo:text-transform="none" fo:font-size="96pt" fo:letter-spacing="normal" fo:font-style="normal" fo:font-weight="normal" style:font-size-asian="96pt" style:font-size-complex="96pt"/>
    </style:style>
    <style:style style:name="T17" style:family="text">
      <style:text-properties fo:font-variant="normal" fo:text-transform="none" fo:font-size="96pt" fo:letter-spacing="normal" fo:font-style="normal" fo:font-weight="normal" officeooo:rsid="0021251c" style:font-size-asian="96pt" style:font-size-complex="9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07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uthanasie en France.</text:p>
      <text:p text:style-name="P1"/>
      <text:p text:style-name="P4"><text:span text:style-name="T2"><text:s/></text:span><text:span text:style-name="T3">Source : wikipedia , </text:span></text:p>
      <text:p text:style-name="P7"/>
      <text:p text:style-name="P7">https://www.linternaute.fr/actualite/biographie/1776572-vincent-humbert-biographie-courte-dates-citations/#:~:text=Biographie%20courte%20de%20Vincent%20Humbert%20%2D%20Vincent%20Humbert%20%C3%A9tait%20un%20jeune,sollicitant%20le%20droit%20de%20mourir.</text:p>
      <text:p text:style-name="P2"/>
      <text:p text:style-name="P8"/>
      <text:p text:style-name="P8"/>
      <text:p text:style-name="P8"/>
      <text:p text:style-name="P3"><text:span text:style-name="T4">L'euthanasie est un sujet complexe et délicat qui suscite de nombreux débats en France. Au cœur de cette discussion se trouve l'affaire de Vincent Humbert, un jeune homme devenu tétraplégique à la suite d'un accident de moto en 2000. Après des années de souffrance, Vincent a exprimé son désir de mourir, ce qui a conduit sa mère à demander une assistance pour mettre fin à ses jours. Son cas a fait l'objet de médiatisation et a soulevé des questions éthiques sur le droit à mourir dans la dignité.</text:span><text:span text:style-name="T1"><text:line-break/><text:line-break/></text:span><text:span text:style-name="T4">En France, l'euthanasie active, c'est-à-dire le fait d'agir pour provoquer la mort d'une personne, est illégale. Cependant, la loi Leonetti de 2005, suivie de la loi Claeys-Leonetti de 2016, a introduit des dispositions concernant la fin de vie. Ces lois permettent d'appliquer des soins palliatifs et d'autoriser l'arrêt des traitements lorsque la personne est en phase terminale, souffrant de douleurs insupportables. Elles établissent également le droit à une sédation profonde et continue jusqu'au décès, mais ne légalisent pas l'euthanasie.</text:span><text:span text:style-name="T1"><text:line-break/><text:line-break/></text:span></text:p>
      <text:p text:style-name="P9"/>
      <text:p text:style-name="P3"><text:span text:style-name="T4">Ainsi, l'affaire de Vincent Humbert a été un catalyseur pour la réflexion sur la législation française concernant la fin de vie, et la question de l'euthanasie continue d'être un enjeu sociétal majeur </text:span><text:span text:style-name="T5">en France</text:span><text:span text:style-name="T4">.</text:span><text:span text:style-name="T1">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1" text:anchor-type="char" svg:x="-1.487cm" svg:y="0.254cm" svg:width="9.573cm" svg:height="14.289cm" draw:z-index="0"><draw:image xlink:href="Pictures/10000000000002AE000004009DDFA8E8D5DEA93E.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https://www.capretraite.fr/blog/actualites/3-faits-sur-la-fin-de-vie-en-france/#:~:text=Les%20arguments%20pour%20l'euthanasie&amp;text=Le%20droit%20de%20disposer%20de,ne%20prolongent%20que%20leur%20agonie.</text:p>
      <text:p text:style-name="P11"/>
      <text:p text:style-name="P11"/>
      <text:p text:style-name="P11">https://www.youtube.com/watch?v=daHswJknkQA</text:p>
      <text:p text:style-name="P11"/>
      <text:p text:style-name="P6"><text:span text:style-name="T9">p</text:span><text:span text:style-name="T8">arti 3 : pour et contre </text:span><text:span text:style-name="T4"><text:s/></text:span></text:p>
      <text:p text:style-name="P3"><text:span text:style-name="T4">Le débat sur l'euthanasie en France </text:span><text:span text:style-name="T5">est</text:span><text:span text:style-name="T4"> vivant, avec des opinions divergentes sur la nécessité d'une législation qui autoriserait cette pratique dans certains cas. Les partisans de l'euthanasie </text:span><text:span text:style-name="T7">pensent </text:span><text:span text:style-name="T4"><text:s/>qu'il s'agit d'un droit fondamental à choisir sa fin de vie, tandis que les opposants mettent en avant des préoccupations éthiques et le risque d'abus. </text:span></text:p>
      <text:p text:style-name="P5"><text:span text:style-name="T4"><text:s/>En effet certains pense que l’euthanasie devrait être légaliser </text:span><text:span text:style-name="T6">ceux ci s’appuie sur des argument telle que : le droit de disposer de sa propre fin de vie, le soulagement de la souffrance moral et physique des patients, l’économie des ressource médical pour les patient condamnées et </text:span><text:span text:style-name="T7">enfin </text:span><text:span text:style-name="T6">éviter de faire souffrir les proches et la famille plus longtemps.</text:span></text:p>
      <text:p text:style-name="P12"><draw:frame text:anchor-type="paragraph" draw:z-index="5" draw:name="Cadre de texte 1" draw:style-name="gr1" draw:text-style-name="P15" svg:width="14.95cm" svg:height="4.075cm" svg:x="1.568cm" svg:y="15.182cm"><draw:text-box><text:p>Ce document est un sondage fait par Game Changers en 2013 montrant l’opinion des français a l’égard de l’euthanasie Comme nous <text:s text:c="2"/>le montre ce sondage qui est classer selon l’age, la profession et le parti politique des français, la majorité est pour l’euthanasie passive, tandis que environ 1/3 et pour l’euthanasie active et une petite minoritaire est contre. Donc 96 % des français sont pour le droit a l’euthanasie.</text:p></draw:text-box></draw:frame><text:soft-page-break/><text:span text:style-name="T7">Ce</text:span><text:span text:style-name="T4">pendant certaines personnes sont contre l’euthanasie car ils pensent que la vie humain ne peux </text:span><text:span text:style-name="T7">p</text:span><text:span text:style-name="T4">as être interrompu volontairement ,</text:span><text:span text:style-name="T7">craignant </text:span><text:span text:style-name="T4"><text:s/>le risque d’abus ou du n</text:span><draw:frame draw:style-name="fr1" draw:name="Image2" text:anchor-type="char" svg:x="0.291cm" svg:y="4.025cm" svg:width="17cm" svg:height="9.562cm" draw:z-index="1"><draw:image xlink:href="Pictures/1000000000000400000002402CFF9735042523B3.png" xlink:type="simple" xlink:show="embed" xlink:actuate="onLoad" draw:mime-type="image/png"/></draw:frame><text:span text:style-name="T4">on consentement , </text:span><text:span text:style-name="T7">et </text:span><text:span text:style-name="T4">la peur que celle ci soit <text:s/>banaliser </text:span></text:p>
      <text:p text:style-name="P13"><text:span text:style-name="T15"><text:s/></text:span><text:span text:style-name="T16">DROI</text:span><text:span text:style-name="T17">T </text:span><text:span text:style-name="T16">A</text:span></text:p>
      <text:p text:style-name="P14"><text:span text:style-name="T16">L’EUTHANASIE</text:span><draw:frame draw:style-name="fr1" draw:name="Image3" text:anchor-type="char" svg:x="3.874cm" svg:y="13.809cm" svg:width="9.631cm" svg:height="9.631cm" draw:z-index="2"><draw:image xlink:href="Pictures/10000000000001C2000001C22A7A2C1924E7E7C6.png" xlink:type="simple" xlink:show="embed" xlink:actuate="onLoad" draw:mime-type="image/png"/></draw:frame><draw:frame draw:style-name="fr1" draw:name="Image4" text:anchor-type="char" svg:x="13.13cm" svg:y="4.921cm" svg:width="3.81cm" svg:height="5.292cm" draw:z-index="3"><draw:image xlink:href="Pictures/1000000000000090000000C8B47167666E9DFD52.png" xlink:type="simple" xlink:show="embed" xlink:actuate="onLoad" draw:mime-type="image/png"/></draw:frame><draw:frame draw:style-name="fr1" draw:name="Image5" text:anchor-type="char" svg:x="-0.616cm" svg:y="5.071cm" svg:width="11.035cm" svg:height="7.362cm" draw:z-index="4"><draw:image xlink:href="Pictures/1000000000000298000001BBA6AB296341A4629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Black" svg:font-family="'Arial Black'" style:font-family-generic="swiss" style:font-pitch="variable"/>
    <style:font-face style:name="Bernard MT Condensed" svg:font-family="'Bernard MT Condensed'" style:font-family-generic="roman" style:font-pitch="variable"/>
    <style:font-face style:name="Blackadder ITC" svg:font-family="'Blackadder ITC'" style:font-family-generic="decorative"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3T11:20:35.112000000</meta:creation-date>
    <dc:date>2024-12-11T11:53:54.236000000</dc:date>
    <meta:editing-duration>PT19M47S</meta:editing-duration>
    <meta:editing-cycles>3</meta:editing-cycles>
    <meta:generator>LibreOffice/7.3.7.2$Windows_X86_64 LibreOffice_project/e114eadc50a9ff8d8c8a0567d6da8f454beeb84f</meta:generator>
    <meta:document-statistic meta:table-count="0" meta:image-count="5" meta:object-count="0" meta:page-count="4" meta:paragraph-count="13" meta:word-count="369" meta:character-count="2784" meta:non-whitespace-character-count="2413"/>
  </office:meta>
</office:document-meta>
</file>